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6060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0" style:parent-style-name="Graphics">
      <style:graphic-properties draw:fill="none" draw:stroke="non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2778in" style:font-size-asian="0.52778in" style:font-size-complex="0.52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draw:stroke="non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2778in" style:font-size-asian="0.52778in" style:font-size-complex="0.52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6060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non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8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text" style:name="a799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 style:parent-style-name="Graphics">
      <style:graphic-properties draw:fill="none" draw:stroke="none"/>
    </style:style>
    <style:style style:family="graphic" style:name="a842" style:parent-style-name="Graphics">
      <style:graphic-properties draw:fill="none" draw:stroke="none"/>
    </style:style>
    <style:style style:family="graphic" style:name="a843" style:parent-style-name="Graphics">
      <style:graphic-properties draw:fill="none" draw:stroke="none"/>
    </style:style>
    <style:style style:family="graphic" style:name="a844" style:parent-style-name="Graphics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7" style:parent-style-name="Graphics">
      <style:graphic-properties draw:fill="none" draw:stroke="non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2" style:parent-style-name="Graphics">
      <style:graphic-properties draw:fill="none" draw:stroke="none"/>
    </style:style>
    <style:style style:family="graphic" style:name="a853" style:parent-style-name="Graphics">
      <style:graphic-properties draw:fill="none" draw:stroke="none"/>
    </style:style>
    <style:style style:family="graphic" style:name="a854" style:parent-style-name="Graphics">
      <style:graphic-properties draw:fill="none" draw:stroke="none"/>
    </style:style>
    <style:style style:family="graphic" style:name="a855" style:parent-style-name="Graphics">
      <style:graphic-properties draw:fill="none" draw:stroke="non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 style:parent-style-name="Graphics">
      <style:graphic-properties draw:fill="none" draw:stroke="none"/>
    </style:style>
    <style:style style:family="graphic" style:name="a903" style:parent-style-name="Graphics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6060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6060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1" style:parent-style-name="Graphics">
      <style:graphic-properties draw:fill="none" draw:stroke="none"/>
    </style:style>
    <style:style style:family="graphic" style:name="a1012" style:parent-style-name="Graphics">
      <style:graphic-properties draw:fill="none" draw:stroke="none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draw:stroke="non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6060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 style:parent-style-name="Graphics">
      <style:graphic-properties draw:fill="none" draw:stroke="non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6060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draw:fill="none" draw:stroke="solid" svg:stroke-width="0.01389in" svg:stroke-color="#000000" svg:stroke-opacity="100%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 style:parent-style-name="Graphics">
      <style:graphic-properties draw:fill="none" draw:stroke="non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6060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 style:parent-style-name="Graphics">
      <style:graphic-properties draw:fill="none" draw:stroke="non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 style:parent-style-name="Graphics">
      <style:graphic-properties draw:fill="none" draw:stroke="none"/>
    </style:style>
    <style:style style:family="graphic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0" style:parent-style-name="Graphics">
      <style:graphic-properties draw:fill="none" draw:stroke="non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6060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45ba7" style:text-line-through-type="none" style:text-line-through-style="none" style:text-line-through-width="auto" style:text-line-through-color="font-color" style:text-position="0% 100%" fo:font-family="Arial Rounded MT Bold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0" style:parent-style-name="Graphics">
      <style:graphic-properties draw:fill="none" draw:stroke="non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1038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2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1005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825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2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1027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35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00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38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82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894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897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863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866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26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869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71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29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74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1032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977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  <text:list-style style:name="a1035">
      <text:list-level-style-bullet text:level="1" text:bullet-char="§">
        <style:list-level-properties text:space-before="0in" text:min-label-width="0.25in"/>
        <style:text-properties fo:color="#045ba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045ba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45ba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45ba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45ba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45ba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45ba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45ba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45ba7" fo:font-family="Wingding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custom-shape svg:x="0in" svg:y="0in" svg:width="13.33333in" svg:height="7.5in" draw:id="id69" draw:style-name="a779" draw:name="Rectangle 9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80" draw:name="Picture 4" svg:x="1.41in" svg:y="1.22388in" svg:width="8.88389in" svg:height="2.42086in" style:rel-width="scale" style:rel-height="scale">
          <draw:image xlink:href="media/image1.jpg" xlink:type="simple" xlink:show="embed" xlink:actuate="onLoad"/>
          <svg:title/>
          <svg:desc/>
        </draw:frame>
        <draw:custom-shape svg:x="9.37962in" svg:y="3.64815in" svg:width="3.6in" svg:height="3.5in" draw:id="id71" draw:style-name="a783" draw:name="Right Triangle 11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72" draw:style-name="a786" draw:name="Rectangle 13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790" draw:name="Title 1" svg:x="1.41in" svg:y="3.75in" svg:width="9.75686in" svg:height="1.87369in" presentation:class="title" presentation:placeholder="false">
          <draw:text-box>
            <text:p text:style-name="a789" text:class-names="" text:cond-style-name=""><text:span text:style-name="a787" text:class-names="">Ellipsoid raspberry particles<text:line-break/>&amp;<text:line-break/>Thermal Stoner-Wohlfarth</text:span><text:span text:style-name="a788" text:class-names=""/></text:p>
          </draw:text-box>
          <svg:title/>
          <svg:desc/>
        </draw:frame>
        <draw:frame draw:id="id74" presentation:style-name="a796" draw:name="Subtitle 2" svg:x="1.41in" svg:y="5.62369in" svg:width="8.00667in" svg:height="0.82367in" presentation:class="subtitle" presentation:placeholder="false">
          <draw:text-box>
            <text:p text:style-name="a792" text:class-names="" text:cond-style-name=""><text:span text:style-name="a791" text:class-names="">Florian Klee</text:span></text:p>
            <text:p text:style-name="a795" text:class-names="" text:cond-style-name=""><text:span text:style-name="a793" text:class-names="">Supervisor: Pedro A. Sánchez</text:span><text:span text:style-name="a794" text:class-names=""/></text:p>
          </draw:text-box>
          <svg:title/>
          <svg:desc/>
        </draw:frame>
      </draw:page>
      <draw:page draw:name="Slide2" draw:style-name="a797" draw:master-page-name="Master1-Layout2-obj-Title-and-Content" presentation:presentation-page-layout-name="Master1-PPL2" draw:id="Slide-257">
        <draw:frame draw:id="id75" presentation:style-name="a801" draw:name="Title 1" svg:x="0.18399in" svg:y="-0.35833in" svg:width="11.5in" svg:height="1.44965in" presentation:class="title" presentation:placeholder="false">
          <draw:text-box>
            <text:p text:style-name="a800" text:class-names="" text:cond-style-name=""><text:span text:style-name="a798" text:class-names="">The project</text:span><text:span text:style-name="a799" text:class-names=""/></text:p>
          </draw:text-box>
          <svg:title/>
          <svg:desc/>
        </draw:frame>
        <draw:frame draw:id="id76" presentation:style-name="a808" draw:name="Content Placeholder 2" svg:x="0.35231in" svg:y="1.64999in" svg:width="11.5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Recreate effects shown in: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in simulation <text:s text:c="1"/></text:span></text:p>
              </text:list-item>
            </text:list>
          </draw:text-box>
          <svg:title/>
          <svg:desc/>
        </draw:frame>
        <draw:frame draw:id="id77" draw:style-name="a809" draw:name="Picture 4" svg:x="8.88649in" svg:y="6.2297in" svg:width="4.34375in" svg:height="1.18782in" style:rel-width="scale" style:rel-height="scale">
          <draw:image xlink:href="media/image1.jpg" xlink:type="simple" xlink:show="embed" xlink:actuate="onLoad"/>
          <svg:title/>
          <svg:desc/>
        </draw:frame>
        <draw:custom-shape svg:x="0in" svg:y="0.71664in" svg:width="13.33333in" svg:height="0.27055in" draw:id="id78" draw:style-name="a812" draw:name="Rectangle 9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813" draw:name="Picture 11" svg:x="5.42248in" svg:y="1.1089in" svg:width="6.67802in" svg:height="1.90652in" style:rel-width="scale" style:rel-height="scale">
          <draw:image xlink:href="media/image2.png" xlink:type="simple" xlink:show="embed" xlink:actuate="onLoad"/>
          <svg:title/>
          <svg:desc/>
        </draw:frame>
        <draw:custom-shape svg:x="5.42248in" svg:y="1.1089in" svg:width="6.67802in" svg:height="1.90652in" draw:id="id80" draw:style-name="a816" draw:name="Rectangle 12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817" draw:name="Picture 16" svg:x="0.10309in" svg:y="3.3658in" svg:width="6.2048in" svg:height="4.0517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818" draw:master-page-name="Master1-Layout2-obj-Title-and-Content" presentation:presentation-page-layout-name="Master1-PPL2" draw:id="Slide-259">
        <draw:frame draw:id="id82" presentation:style-name="a822" draw:name="Title 1" svg:x="0.18399in" svg:y="-0.35833in" svg:width="11.5in" svg:height="1.44965in" presentation:class="title" presentation:placeholder="false">
          <draw:text-box>
            <text:p text:style-name="a821" text:class-names="" text:cond-style-name=""><text:span text:style-name="a819" text:class-names="">The project</text:span><text:span text:style-name="a820" text:class-names=""/></text:p>
          </draw:text-box>
          <svg:title/>
          <svg:desc/>
        </draw:frame>
        <draw:frame draw:id="id83" presentation:style-name="a829" draw:name="Content Placeholder 2" svg:x="0.35231in" svg:y="1.64999in" svg:width="11.5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Recreate effects shown in: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in simulation <text:s text:c="1"/></text:span></text:p>
              </text:list-item>
            </text:list>
          </draw:text-box>
          <svg:title/>
          <svg:desc/>
        </draw:frame>
        <draw:frame draw:id="id84" draw:style-name="a830" draw:name="Picture 4" svg:x="8.88649in" svg:y="6.2297in" svg:width="4.34375in" svg:height="1.18782in" style:rel-width="scale" style:rel-height="scale">
          <draw:image xlink:href="media/image1.jpg" xlink:type="simple" xlink:show="embed" xlink:actuate="onLoad"/>
          <svg:title/>
          <svg:desc/>
        </draw:frame>
        <draw:custom-shape svg:x="0in" svg:y="0.71664in" svg:width="13.33333in" svg:height="0.27055in" draw:id="id85" draw:style-name="a833" draw:name="Rectangle 9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834" draw:name="Picture 11" svg:x="5.42248in" svg:y="1.1089in" svg:width="6.67802in" svg:height="1.90652in" style:rel-width="scale" style:rel-height="scale">
          <draw:image xlink:href="media/image2.png" xlink:type="simple" xlink:show="embed" xlink:actuate="onLoad"/>
          <svg:title/>
          <svg:desc/>
        </draw:frame>
        <draw:custom-shape svg:x="5.42248in" svg:y="1.1089in" svg:width="6.67802in" svg:height="1.90652in" draw:id="id87" draw:style-name="a837" draw:name="Rectangle 12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38" draw:name="Picture 16" svg:x="0.10309in" svg:y="3.3658in" svg:width="6.2048in" svg:height="4.05171in" style:rel-width="scale" style:rel-height="scale">
          <draw:image xlink:href="media/image3.png" xlink:type="simple" xlink:show="embed" xlink:actuate="onLoad"/>
          <svg:title/>
          <svg:desc/>
        </draw:frame>
        <draw:frame draw:id="id89" draw:style-name="a839" draw:name="Ink 56" svg:x="6.75212in" svg:y="3.26109in" svg:width="6.2685in" svg:height="0.2252in" style:rel-width="scale" style:rel-height="scale">
          <draw:image xlink:href="media/image4.png" xlink:type="simple" xlink:show="embed" xlink:actuate="onLoad"/>
          <svg:title/>
          <svg:desc/>
        </draw:frame>
        <draw:frame draw:id="id90" draw:style-name="a840" draw:name="Ink 57" svg:x="7.01945in" svg:y="5.28668in" svg:width="5.75197in" svg:height="0.17913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841" draw:name="Ink 58" svg:x="11.54937in" svg:y="3.58393in" svg:width="1.17087in" svg:height="1.69409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842" draw:name="Ink 59" svg:x="8.83546in" svg:y="5.53488in" svg:width="3.14094in" svg:height="0.34882in" style:rel-width="scale" style:rel-height="scale">
          <draw:image xlink:href="media/image7.png" xlink:type="simple" xlink:show="embed" xlink:actuate="onLoad"/>
          <svg:title/>
          <svg:desc/>
        </draw:frame>
        <draw:frame draw:id="id93" draw:style-name="a843" draw:name="Ink 60" svg:x="7.38441in" svg:y="3.97212in" svg:width="0.01417in" svg:height="0.00787in" style:rel-width="scale" style:rel-height="scale">
          <draw:image xlink:href="media/image8.png" xlink:type="simple" xlink:show="embed" xlink:actuate="onLoad"/>
          <svg:title/>
          <svg:desc/>
        </draw:frame>
        <draw:frame draw:id="id94" draw:style-name="a844" draw:name="Ink 61" svg:x="7.78677in" svg:y="4.42133in" svg:width="0.05472in" svg:height="0.02441in" style:rel-width="scale" style:rel-height="scale">
          <draw:image xlink:href="media/image9.png" xlink:type="simple" xlink:show="embed" xlink:actuate="onLoad"/>
          <svg:title/>
          <svg:desc/>
        </draw:frame>
        <draw:frame draw:id="id95" draw:style-name="a845" draw:name="Ink 62" svg:x="7.52378in" svg:y="4.84141in" svg:width="0.00945in" svg:height="0.00039in" style:rel-width="scale" style:rel-height="scale">
          <draw:image xlink:href="media/image10.png" xlink:type="simple" xlink:show="embed" xlink:actuate="onLoad"/>
          <svg:title/>
          <svg:desc/>
        </draw:frame>
        <draw:frame draw:id="id96" draw:style-name="a846" draw:name="Ink 63" svg:x="8.08677in" svg:y="5.1481in" svg:width="0.01181in" svg:height="0.00039in" style:rel-width="scale" style:rel-height="scale">
          <draw:image xlink:href="media/image11.png" xlink:type="simple" xlink:show="embed" xlink:actuate="onLoad"/>
          <svg:title/>
          <svg:desc/>
        </draw:frame>
        <draw:frame draw:id="id97" draw:style-name="a847" draw:name="Ink 64" svg:x="8.02772in" svg:y="3.86109in" svg:width="0.01181in" svg:height="0.00787in" style:rel-width="scale" style:rel-height="scale">
          <draw:image xlink:href="media/image12.png" xlink:type="simple" xlink:show="embed" xlink:actuate="onLoad"/>
          <svg:title/>
          <svg:desc/>
        </draw:frame>
        <draw:g draw:name="Group 65" draw:id="id98">
          <svg:title/>
          <svg:desc/>
          <draw:frame draw:id="id103" draw:style-name="a854" draw:name="Ink 66" svg:x="9.18795in" svg:y="4.99968in" svg:width="1.82283in" svg:height="0.23819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04" draw:style-name="a855" draw:name="Ink 67" svg:x="10.94622in" svg:y="4.97251in" svg:width="0.14291in" svg:height="0.07756in" style:rel-width="scale" style:rel-height="scale">
            <draw:image xlink:href="media/image14.png" xlink:type="simple" xlink:show="embed" xlink:actuate="onLoad"/>
            <svg:title/>
            <svg:desc/>
          </draw:frame>
        </draw:g>
        <draw:g draw:name="Group 68" draw:id="id99">
          <svg:title/>
          <svg:desc/>
          <draw:frame draw:id="id101" draw:style-name="a852" draw:name="Ink 69" svg:x="9.28638in" svg:y="3.83865in" svg:width="1.60748in" svg:height="0.24921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02" draw:style-name="a853" draw:name="Ink 70" svg:x="9.11827in" svg:y="4.11818in" svg:width="0.48465in" svg:height="0.12913in" style:rel-width="scale" style:rel-height="scale">
            <draw:image xlink:href="media/image16.png" xlink:type="simple" xlink:show="embed" xlink:actuate="onLoad"/>
            <svg:title/>
            <svg:desc/>
          </draw:frame>
        </draw:g>
        <draw:frame draw:id="id100" draw:style-name="a851" draw:name="TextBox 71" svg:x="9.89543in" svg:y="5.79979in" svg:width="1.16965in" svg:height="0.40391in">
          <draw:text-box>
            <text:p text:style-name="a850" text:class-names="" text:cond-style-name=""><text:span text:style-name="a848" text:class-names="">stagnant</text:span><text:span text:style-name="a849" text:class-names=""/></text:p>
          </draw:text-box>
          <svg:title/>
          <svg:desc/>
        </draw:frame>
      </draw:page>
      <draw:page draw:name="Slide5" draw:style-name="a856" draw:master-page-name="Master1-Layout2-obj-Title-and-Content" presentation:presentation-page-layout-name="Master1-PPL2" draw:id="Slide-260">
        <draw:frame draw:id="id105" presentation:style-name="a860" draw:name="Title 1" svg:x="0.18399in" svg:y="-0.35833in" svg:width="11.5in" svg:height="1.44965in" presentation:class="title" presentation:placeholder="false">
          <draw:text-box>
            <text:p text:style-name="a859" text:class-names="" text:cond-style-name=""><text:span text:style-name="a857" text:class-names="">Raspberry Ellipsoids</text:span><text:span text:style-name="a858" text:class-names=""/></text:p>
          </draw:text-box>
          <svg:title/>
          <svg:desc/>
        </draw:frame>
        <draw:frame draw:id="id106" presentation:style-name="a870" draw:name="Content Placeholder 2" svg:x="0.35231in" svg:y="1.64999in" svg:width="11.5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Two approaches</text:span></text:p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One for smooth surface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One superior in every other way</text:span></text:p>
                  </text:list-item>
                </text:list>
              </text:list-item>
            </text:list>
          </draw:text-box>
          <svg:title/>
          <svg:desc/>
        </draw:frame>
        <draw:frame draw:id="id107" draw:style-name="a871" draw:name="Picture 4" svg:x="8.88649in" svg:y="6.2297in" svg:width="4.34375in" svg:height="1.18782in" style:rel-width="scale" style:rel-height="scale">
          <draw:image xlink:href="media/image1.jpg" xlink:type="simple" xlink:show="embed" xlink:actuate="onLoad"/>
          <svg:title/>
          <svg:desc/>
        </draw:frame>
        <draw:custom-shape svg:x="0in" svg:y="0.71664in" svg:width="13.33333in" svg:height="0.27055in" draw:id="id108" draw:style-name="a874" draw:name="Rectangle 9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86">
          <draw:page-thumbnail draw:page-number="4" svg:x="0.75in" svg:y="1.25in" svg:width="6in" svg:height="3.375in" presentation:class="page" draw:id="id109" presentation:style-name="a875" draw:name="Slide Image Placeholder 1">
            <svg:title/>
            <svg:desc/>
          </draw:page-thumbnail>
          <draw:frame draw:id="id110" presentation:style-name="a881" draw:name="Notes Placeholder 2" svg:x="0.75in" svg:y="4.8125in" svg:width="6in" svg:height="3.9375in" presentation:class="notes" presentation:placeholder="false">
            <draw:text-box>
              <text:p text:style-name="a878" text:class-names="" text:cond-style-name=""><text:span text:style-name="a876" text:class-names="">Show short clips of the construction of the ellipsoids.<text:line-break/>Should take about 1.5min</text:span><text:span text:style-name="a877" text:class-names=""/></text:p>
              <text:p text:style-name="a880" text:class-names="" text:cond-style-name=""><text:span text:style-name="a879" text:class-names=""/></text:p>
            </draw:text-box>
            <svg:title/>
            <svg:desc/>
          </draw:frame>
          <draw:frame draw:id="id111" draw:style-name="a885" draw:name="Slide Number Placeholder 3" svg:x="4.24826in" svg:y="9.49826in" svg:width="3.25in" svg:height="0.50174in">
            <draw:text-box>
              <text:p text:style-name="a884" text:class-names="" text:cond-style-name=""><text:span text:style-name="a882" text:class-names=""><text:page-number style:num-format="1" text:fixed="false">4</text:page-number></text:span><text:span text:style-name="a883" text:class-names=""/></text:p>
            </draw:text-box>
            <svg:title/>
            <svg:desc/>
          </draw:frame>
        </presentation:notes>
      </draw:page>
      <draw:page draw:name="Slide3" draw:style-name="a887" draw:master-page-name="Master1-Layout2-obj-Title-and-Content" presentation:presentation-page-layout-name="Master1-PPL2" draw:id="Slide-258">
        <draw:frame draw:id="id112" presentation:style-name="a891" draw:name="Title 1" svg:x="0.18399in" svg:y="-0.35833in" svg:width="11.5in" svg:height="1.44965in" presentation:class="title" presentation:placeholder="false">
          <draw:text-box>
            <text:p text:style-name="a890" text:class-names="" text:cond-style-name=""><text:span text:style-name="a888" text:class-names="">Energy contributions</text:span><text:span text:style-name="a889" text:class-names=""/></text:p>
          </draw:text-box>
          <svg:title/>
          <svg:desc/>
        </draw:frame>
        <draw:frame draw:id="id113" presentation:style-name="a901" draw:name="Content Placeholder 2" svg:x="0.35231in" svg:y="1.64999in" svg:width="11.5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Zeeman Energy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Anisotropy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  <draw:frame draw:id="id114" draw:style-name="a902" draw:name="Picture 4" svg:x="8.88649in" svg:y="6.2297in" svg:width="4.34375in" svg:height="1.18782in" style:rel-width="scale" style:rel-height="scale">
          <draw:image xlink:href="media/image1.jpg" xlink:type="simple" xlink:show="embed" xlink:actuate="onLoad"/>
          <svg:title/>
          <svg:desc/>
        </draw:frame>
        <draw:frame draw:id="id115" draw:style-name="a903" draw:name="Picture 8" svg:x="5.83498in" svg:y="1.09133in" svg:width="5.68831in" svg:height="5.07794in" style:rel-width="scale" style:rel-height="scale">
          <draw:image xlink:href="media/image17.png" xlink:type="simple" xlink:show="embed" xlink:actuate="onLoad"/>
          <svg:title/>
          <svg:desc/>
        </draw:frame>
        <draw:custom-shape svg:x="0in" svg:y="0.71664in" svg:width="13.33333in" svg:height="0.27055in" draw:id="id116" draw:style-name="a906" draw:name="Rectangle 9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918" draw:name="TextBox 5" svg:x="9.66149in" svg:y="5.46243in" svg:width="3.7236in" svg:height="0.70684in">
          <draw:text-box>
            <text:p text:style-name="a917" text:class-names="" text:cond-style-name=""><text:span text:style-name="a907" text:class-names="">Deniz<text:s text:c="1"/></text:span><text:span text:style-name="a908" text:class-names="">Mostara</text:span><text:span text:style-name="a909" text:class-names="">c et al</text:span><text:span text:style-name="a910" text:class-names="">. Thermal Stoner–Wohlfarth model for<text:s text:c="1"/></text:span><text:span text:style-name="a911" text:class-names="">magnetodynamics</text:span><text:span text:style-name="a912" text:class-names=""><text:s text:c="1"/>of single domain nanoparticles: implementation and validation.<text:s text:c="1"/></text:span><text:span text:style-name="a913" text:class-names="">Physical Review B</text:span><text:span text:style-name="a914" text:class-names="">, 111(1):014438, January 2025.<text:s text:c="1"/></text:span><text:span text:style-name="a915" text:class-names=""><text:a xlink:href="https://doi.org/10.1103/PhysRevB.111.014438" text:style-name="" text:visited-style-name="">doi:10.1103/PhysRevB.111.014438</text:a></text:span><text:span text:style-name="a916" text:class-names="">.</text:span></text:p>
          </draw:text-box>
          <svg:title/>
          <svg:desc/>
        </draw:frame>
      </draw:page>
      <draw:page draw:name="Slide7" draw:style-name="a919" draw:master-page-name="Master1-Layout2-obj-Title-and-Content" presentation:presentation-page-layout-name="Master1-PPL2" draw:id="Slide-262">
        <draw:frame draw:id="id118" presentation:style-name="a923" draw:name="Title 1" svg:x="0.18399in" svg:y="-0.35833in" svg:width="11.5in" svg:height="1.44965in" presentation:class="title" presentation:placeholder="false">
          <draw:text-box>
            <text:p text:style-name="a922" text:class-names="" text:cond-style-name=""><text:span text:style-name="a920" text:class-names="">Energy contributions</text:span><text:span text:style-name="a921" text:class-names=""/></text:p>
          </draw:text-box>
          <svg:title/>
          <svg:desc/>
        </draw:frame>
        <draw:frame draw:id="id119" presentation:style-name="a939" draw:name="Content Placeholder 2" svg:x="0.35231in" svg:y="1.64999in" svg:width="11.5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Zeeman Energy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Anisotropy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Demag field / Dipole-Dipole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Exchange Interaction</text:span></text:p>
              </text:list-item>
            </text:list>
          </draw:text-box>
          <svg:title/>
          <svg:desc/>
        </draw:frame>
        <draw:frame draw:id="id120" draw:style-name="a940" draw:name="Picture 4" svg:x="8.88649in" svg:y="6.2297in" svg:width="4.34375in" svg:height="1.18782in" style:rel-width="scale" style:rel-height="scale">
          <draw:image xlink:href="media/image1.jpg" xlink:type="simple" xlink:show="embed" xlink:actuate="onLoad"/>
          <svg:title/>
          <svg:desc/>
        </draw:frame>
        <draw:custom-shape svg:x="0in" svg:y="0.71664in" svg:width="13.33333in" svg:height="0.27055in" draw:id="id121" draw:style-name="a943" draw:name="Rectangle 9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947" draw:name="TextBox 3" svg:x="7.87129in" svg:y="2.48515in" svg:width="2.51485in" svg:height="0.40391in">
          <draw:text-box>
            <text:p text:style-name="a946" text:class-names="" text:cond-style-name=""><text:span text:style-name="a944" text:class-names="">img</text:span><text:span text:style-name="a945" text:class-names=""/></text:p>
          </draw:text-box>
          <svg:title/>
          <svg:desc/>
        </draw:frame>
        <presentation:notes draw:style-name="a963">
          <draw:page-thumbnail draw:page-number="6" svg:x="0.75in" svg:y="1.25in" svg:width="6in" svg:height="3.375in" presentation:class="page" draw:id="id123" presentation:style-name="a948" draw:name="Slide Image Placeholder 1">
            <svg:title/>
            <svg:desc/>
          </draw:page-thumbnail>
          <draw:frame draw:id="id124" presentation:style-name="a958" draw:name="Notes Placeholder 2" svg:x="0.75in" svg:y="4.8125in" svg:width="6in" svg:height="3.9375in" presentation:class="notes" presentation:placeholder="false">
            <draw:text-box>
              <text:p text:style-name="a957" text:class-names="" text:cond-style-name=""><text:span text:style-name="a949" text:class-names="">Explanation how exchange influences ferro,<text:s text:c="1"/></text:span><text:span text:style-name="a950" text:class-names="">dia</text:span><text:span text:style-name="a951" text:class-names="">,<text:s text:c="1"/></text:span><text:span text:style-name="a952" text:class-names="">paramagnetism</text:span><text:span text:style-name="a953" text:class-names=""><text:s text:c="1"/>/<text:s text:c="1"/></text:span><text:span text:style-name="a954" text:class-names="">superparamagnetism</text:span><text:span text:style-name="a955" text:class-names=""><text:s text:c="1"/>for my system. But optional really depending on time. If so, will also grey out Exchange interaction entirely.</text:span><text:span text:style-name="a956" text:class-names=""/></text:p>
            </draw:text-box>
            <svg:title/>
            <svg:desc/>
          </draw:frame>
          <draw:frame draw:id="id125" draw:style-name="a962" draw:name="Slide Number Placeholder 3" svg:x="4.24826in" svg:y="9.49826in" svg:width="3.25in" svg:height="0.50174in">
            <draw:text-box>
              <text:p text:style-name="a961" text:class-names="" text:cond-style-name=""><text:span text:style-name="a959" text:class-names=""><text:page-number style:num-format="1" text:fixed="false">6</text:page-number></text:span><text:span text:style-name="a960" text:class-names=""/></text:p>
            </draw:text-box>
            <svg:title/>
            <svg:desc/>
          </draw:frame>
        </presentation:notes>
      </draw:page>
      <draw:page draw:name="Slide6" draw:style-name="a964" draw:master-page-name="Master1-Layout2-obj-Title-and-Content" presentation:presentation-page-layout-name="Master1-PPL2" draw:id="Slide-261">
        <draw:frame draw:id="id126" presentation:style-name="a968" draw:name="Title 1" svg:x="0.18399in" svg:y="-0.35833in" svg:width="11.5in" svg:height="1.44965in" presentation:class="title" presentation:placeholder="false">
          <draw:text-box>
            <text:p text:style-name="a967" text:class-names="" text:cond-style-name=""><text:span text:style-name="a965" text:class-names="">Thermal Stoner-Wohlfarth</text:span><text:span text:style-name="a966" text:class-names=""/></text:p>
          </draw:text-box>
          <svg:title/>
          <svg:desc/>
        </draw:frame>
        <draw:frame draw:id="id127" presentation:style-name="a983" draw:name="Content Placeholder 2" svg:x="0.35231in" svg:y="1.64999in" svg:width="11.5in" svg:height="4.75868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Visually what happens to energy landscape here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For magnetic field str and different direction to ani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78" text:class-names="">MC steps in accordance to<text:s text:c="1"/></text:span><text:span text:style-name="a979" text:class-names="">Boltzman</text:span><text:span text:style-name="a980" text:class-names=""><text:s text:c="1"/>and Energy<text:s text:c="1"/></text:span></text:p>
              </text:list-item>
            </text:list>
          </draw:text-box>
          <svg:title/>
          <svg:desc/>
        </draw:frame>
        <draw:frame draw:id="id128" draw:style-name="a984" draw:name="Picture 4" svg:x="8.88649in" svg:y="6.2297in" svg:width="4.34375in" svg:height="1.18782in" style:rel-width="scale" style:rel-height="scale">
          <draw:image xlink:href="media/image1.jpg" xlink:type="simple" xlink:show="embed" xlink:actuate="onLoad"/>
          <svg:title/>
          <svg:desc/>
        </draw:frame>
        <draw:custom-shape svg:x="0in" svg:y="0.71664in" svg:width="13.33333in" svg:height="0.27055in" draw:id="id129" draw:style-name="a987" draw:name="Rectangle 9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94">
          <draw:page-thumbnail draw:page-number="7" svg:x="0.75in" svg:y="1.25in" svg:width="6in" svg:height="3.375in" presentation:class="page" draw:id="id130" presentation:style-name="a988" draw:name="Slide Image Placeholder 1">
            <svg:title/>
            <svg:desc/>
          </draw:page-thumbnail>
          <draw:frame draw:id="id131" presentation:style-name="a9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2" draw:style-name="a993" draw:name="Slide Number Placeholder 3" svg:x="4.24826in" svg:y="9.49826in" svg:width="3.25in" svg:height="0.50174in">
            <draw:text-box>
              <text:p text:style-name="a992" text:class-names="" text:cond-style-name=""><text:span text:style-name="a990" text:class-names=""><text:page-number style:num-format="1" text:fixed="false">7</text:page-number></text:span><text:span text:style-name="a991" text:class-names=""/></text:p>
            </draw:text-box>
            <svg:title/>
            <svg:desc/>
          </draw:frame>
        </presentation:notes>
      </draw:page>
      <draw:page draw:name="Slide8" draw:style-name="a995" draw:master-page-name="Master1-Layout2-obj-Title-and-Content" presentation:presentation-page-layout-name="Master1-PPL2" draw:id="Slide-263">
        <draw:frame draw:id="id133" presentation:style-name="a999" draw:name="Title 1" svg:x="0.18399in" svg:y="-0.35833in" svg:width="11.5in" svg:height="1.44965in" presentation:class="title" presentation:placeholder="false">
          <draw:text-box>
            <text:p text:style-name="a998" text:class-names="" text:cond-style-name=""><text:span text:style-name="a996" text:class-names="">Magnetic response</text:span><text:span text:style-name="a997" text:class-names=""/></text:p>
          </draw:text-box>
          <svg:title/>
          <svg:desc/>
        </draw:frame>
        <draw:frame draw:id="id134" presentation:style-name="a1006" draw:name="Content Placeholder 2" svg:x="0.35231in" svg:y="1.64999in" svg:width="11.5in" svg:height="4.75868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Response curves</text:span></text:p>
              </text:list-item>
            </text:list>
          </draw:text-box>
          <svg:title/>
          <svg:desc/>
        </draw:frame>
        <draw:frame draw:id="id135" draw:style-name="a1007" draw:name="Picture 4" svg:x="8.88649in" svg:y="6.2297in" svg:width="4.34375in" svg:height="1.18782in" style:rel-width="scale" style:rel-height="scale">
          <draw:image xlink:href="media/image1.jpg" xlink:type="simple" xlink:show="embed" xlink:actuate="onLoad"/>
          <svg:title/>
          <svg:desc/>
        </draw:frame>
        <draw:custom-shape svg:x="0in" svg:y="0.71664in" svg:width="13.33333in" svg:height="0.27055in" draw:id="id136" draw:style-name="a1010" draw:name="Rectangle 9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1011" draw:name="Picture 5" svg:x="0.0267in" svg:y="2.82253in" svg:width="7.48186in" svg:height="4.48912in" style:rel-width="scale" style:rel-height="scale">
          <draw:image xlink:href="media/image18.png" xlink:type="simple" xlink:show="embed" xlink:actuate="onLoad"/>
          <svg:title/>
          <svg:desc/>
        </draw:frame>
        <draw:frame draw:id="id138" draw:style-name="a1012" draw:name="Picture 7" svg:x="6.93332in" svg:y="0.98719in" svg:width="6.40001in" svg:height="4.8000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019">
          <draw:page-thumbnail draw:page-number="8" svg:x="0.75in" svg:y="1.25in" svg:width="6in" svg:height="3.375in" presentation:class="page" draw:id="id139" presentation:style-name="a1013" draw:name="Slide Image Placeholder 1">
            <svg:title/>
            <svg:desc/>
          </draw:page-thumbnail>
          <draw:frame draw:id="id140" presentation:style-name="a10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1" draw:style-name="a1018" draw:name="Slide Number Placeholder 3" svg:x="4.24826in" svg:y="9.49826in" svg:width="3.25in" svg:height="0.50174in">
            <draw:text-box>
              <text:p text:style-name="a1017" text:class-names="" text:cond-style-name=""><text:span text:style-name="a1015" text:class-names=""><text:page-number style:num-format="1" text:fixed="false">8</text:page-number></text:span><text:span text:style-name="a1016" text:class-names=""/></text:p>
            </draw:text-box>
            <svg:title/>
            <svg:desc/>
          </draw:frame>
        </presentation:notes>
      </draw:page>
      <draw:page draw:name="Slide9" draw:style-name="a1020" draw:master-page-name="Master1-Layout2-obj-Title-and-Content" presentation:presentation-page-layout-name="Master1-PPL2" draw:id="Slide-264">
        <draw:frame draw:id="id142" presentation:style-name="a1024" draw:name="Title 1" svg:x="0.18399in" svg:y="-0.35833in" svg:width="11.5in" svg:height="1.44965in" presentation:class="title" presentation:placeholder="false">
          <draw:text-box>
            <text:p text:style-name="a1023" text:class-names="" text:cond-style-name=""><text:span text:style-name="a1021" text:class-names="">Outlook</text:span><text:span text:style-name="a1022" text:class-names=""/></text:p>
          </draw:text-box>
          <svg:title/>
          <svg:desc/>
        </draw:frame>
        <draw:frame draw:id="id143" presentation:style-name="a1039" draw:name="Content Placeholder 2" svg:x="0.35231in" svg:y="1.64999in" svg:width="11.5in" svg:height="4.7586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Piece together simulation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8" text:class-names="">Including Lattice-</text:span><text:span text:style-name="a1029" text:class-names="">Boltzman</text:span><text:span text:style-name="a1030" text:class-names=""><text:s text:c="1"/>Fluid dynamics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Rotating magnetic field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Try to induce recirculation flow</text:span></text:p>
              </text:list-item>
            </text:list>
          </draw:text-box>
          <svg:title/>
          <svg:desc/>
        </draw:frame>
        <draw:frame draw:id="id144" draw:style-name="a1040" draw:name="Picture 4" svg:x="8.88649in" svg:y="6.2297in" svg:width="4.34375in" svg:height="1.18782in" style:rel-width="scale" style:rel-height="scale">
          <draw:image xlink:href="media/image1.jpg" xlink:type="simple" xlink:show="embed" xlink:actuate="onLoad"/>
          <svg:title/>
          <svg:desc/>
        </draw:frame>
        <draw:custom-shape svg:x="0in" svg:y="0.71664in" svg:width="13.33333in" svg:height="0.27055in" draw:id="id145" draw:style-name="a1043" draw:name="Rectangle 9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53">
          <draw:page-thumbnail draw:page-number="9" svg:x="0.75in" svg:y="1.25in" svg:width="6in" svg:height="3.375in" presentation:class="page" draw:id="id146" presentation:style-name="a1044" draw:name="Slide Image Placeholder 1">
            <svg:title/>
            <svg:desc/>
          </draw:page-thumbnail>
          <draw:frame draw:id="id147" presentation:style-name="a1048" draw:name="Notes Placeholder 2" svg:x="0.75in" svg:y="4.8125in" svg:width="6in" svg:height="3.9375in" presentation:class="notes" presentation:placeholder="false">
            <draw:text-box>
              <text:p text:style-name="a1047" text:class-names="" text:cond-style-name=""><text:span text:style-name="a1045" text:class-names="">Visualize what happens t</text:span><text:span text:style-name="a1046" text:class-names=""/></text:p>
            </draw:text-box>
            <svg:title/>
            <svg:desc/>
          </draw:frame>
          <draw:frame draw:id="id148" draw:style-name="a1052" draw:name="Slide Number Placeholder 3" svg:x="4.24826in" svg:y="9.49826in" svg:width="3.25in" svg:height="0.50174in">
            <draw:text-box>
              <text:p text:style-name="a1051" text:class-names="" text:cond-style-name=""><text:span text:style-name="a1049" text:class-names=""><text:page-number style:num-format="1" text:fixed="false">9</text:page-number></text:span><text:span text:style-name="a105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2/06/202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2/06/2026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2/06/2026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2/06/2026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2/06/2026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2/06/2026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2/06/2026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2/06/2026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2/06/2026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2/06/2026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2/06/2026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2/06/2026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2/06/2026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2/06/2026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2/06/2026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2/06/2026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2/06/2026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2/06/2026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2/06/2026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2/06/2026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2/06/2026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2/06/2026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2/06/2026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2/06/2026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eck eier</meta:initial-creator>
    <dc:creator>leck eier</dc:creator>
    <meta:creation-date>2026-06-22T07:45:50Z</meta:creation-date>
    <dc:date>2026-06-22T12:54:04Z</dc:date>
    <meta:editing-cycles>1</meta:editing-cycles>
    <meta:editing-duration>PT18382S</meta:editing-duration>
    <meta:document-statistic meta:paragraph-count="46" meta:word-count="210"/>
  </office:meta>
</office:document-meta>
</file>